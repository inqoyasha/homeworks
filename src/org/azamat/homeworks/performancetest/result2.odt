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41180" officeooo:paragraph-rsid="001ae173"/>
    </style:style>
    <style:style style:name="P2" style:family="paragraph" style:parent-style-name="Standard">
      <style:text-properties officeooo:paragraph-rsid="00141180"/>
    </style:style>
    <style:style style:name="P3" style:family="paragraph" style:parent-style-name="Standard">
      <style:text-properties fo:font-size="14pt" officeooo:rsid="00141180" officeooo:paragraph-rsid="00141180" style:font-size-asian="14pt" style:font-size-complex="14pt"/>
    </style:style>
    <style:style style:name="P4" style:family="paragraph" style:parent-style-name="Standard">
      <style:text-properties fo:font-size="14pt" fo:font-style="italic" officeooo:rsid="00141180" officeooo:paragraph-rsid="00141180" style:font-size-asian="14pt" style:font-style-asian="italic" style:font-size-complex="14pt" style:font-style-complex="italic"/>
    </style:style>
    <style:style style:name="P5" style:family="paragraph" style:parent-style-name="Standard">
      <style:text-properties officeooo:paragraph-rsid="001542ef"/>
    </style:style>
    <style:style style:name="P6" style:family="paragraph" style:parent-style-name="Standard">
      <style:text-properties officeooo:paragraph-rsid="0016e815"/>
    </style:style>
    <style:style style:name="P7" style:family="paragraph" style:parent-style-name="Standard">
      <style:text-properties officeooo:paragraph-rsid="001ae173"/>
    </style:style>
    <style:style style:name="P8" style:family="paragraph" style:parent-style-name="Table_20_Contents">
      <style:text-properties fo:font-size="14pt" officeooo:paragraph-rsid="001ae173" style:font-size-asian="14pt" style:font-size-complex="14pt"/>
    </style:style>
    <style:style style:name="P9" style:family="paragraph" style:parent-style-name="Table_20_Contents">
      <style:text-properties fo:font-size="12pt" officeooo:rsid="00186fd0" officeooo:paragraph-rsid="001ae173" style:font-size-asian="12pt" style:font-size-complex="12pt"/>
    </style:style>
    <style:style style:name="P10" style:family="paragraph" style:parent-style-name="Table_20_Contents">
      <style:text-properties fo:font-size="12pt" officeooo:rsid="00186fd0" officeooo:paragraph-rsid="001b45aa" style:font-size-asian="12pt" style:font-size-complex="12pt"/>
    </style:style>
    <style:style style:name="P11" style:family="paragraph" style:parent-style-name="Table_20_Contents">
      <style:text-properties fo:font-size="12pt" officeooo:rsid="001b45aa" officeooo:paragraph-rsid="001b45aa" style:font-size-asian="12pt" style:font-size-complex="12pt"/>
    </style:style>
    <style:style style:name="T1" style:family="text">
      <style:text-properties officeooo:rsid="0014118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1180" style:font-size-asian="14pt" style:font-size-complex="14pt"/>
    </style:style>
    <style:style style:name="T4" style:family="text">
      <style:text-properties fo:font-size="14pt" officeooo:rsid="001ae173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41180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41180" style:font-size-asian="12.25pt" style:font-weight-asian="bold" style:font-size-complex="14pt" style:font-weight-complex="bold"/>
    </style:style>
    <style:style style:name="T8" style:family="text">
      <style:text-properties fo:font-size="14pt" officeooo:rsid="00141180" style:font-size-asian="12.25pt" style:font-size-complex="14pt"/>
    </style:style>
    <style:style style:name="T9" style:family="text">
      <style:text-properties fo:font-size="14pt" officeooo:rsid="001ae173" style:font-size-asian="12.25pt" style:font-size-complex="14pt"/>
    </style:style>
    <style:style style:name="T1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fo:font-weight="bold" officeooo:rsid="00141180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fo:font-weight="bold" officeooo:rsid="001542ef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US" fo:font-weight="normal" officeooo:rsid="00141180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01ae173" style:font-size-asian="14pt" style:font-weight-asian="normal" style:font-size-complex="14pt" style:font-weight-complex="normal"/>
    </style:style>
    <style:style style:name="T16" style:family="text">
      <style:text-properties fo:font-size="14pt" fo:language="en" fo:country="US" fo:font-weight="normal" officeooo:rsid="001b45aa" style:font-size-asian="14pt" style:font-weight-asian="normal" style:font-size-complex="14pt" style:font-weight-complex="normal"/>
    </style:style>
    <style:style style:name="T17" style:family="text">
      <style:text-properties fo:font-size="14pt" fo:language="en" fo:country="US" fo:font-weight="normal" officeooo:rsid="001c9779" style:font-size-asian="14pt" style:font-weight-asian="normal" style:font-size-complex="14pt" style:font-weight-complex="normal"/>
    </style:style>
    <style:style style:name="T18" style:family="text">
      <style:text-properties fo:font-size="14pt" fo:language="en" fo:country="US" fo:font-weight="normal" officeooo:rsid="00141180" style:font-size-asian="12.25pt" style:font-weight-asian="normal" style:font-size-complex="14pt" style:font-weight-complex="normal"/>
    </style:style>
    <style:style style:name="T19" style:family="text">
      <style:text-properties fo:font-size="14pt" fo:language="en" fo:country="US" fo:font-weight="normal" officeooo:rsid="001542ef" style:font-size-asian="12.25pt" style:font-weight-asian="normal" style:font-size-complex="14pt" style:font-weight-complex="normal"/>
    </style:style>
    <style:style style:name="T20" style:family="text">
      <style:text-properties fo:font-size="14pt" fo:language="en" fo:country="US" fo:font-weight="normal" officeooo:rsid="001ae173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141180" style:font-size-asian="12.25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ыводы на основании полученных результатов во втором задании(Test Performance of Collections):</text:p>
      <text:p text:style-name="P3"/>
      <text:p text:style-name="P2"><text:span text:style-name="T6">a. </text:span><text:span text:style-name="T3">В результате сравнения основных операций(</text:span><text:span text:style-name="T2">добавление, вставка, удаление элементов</text:span>) <text:span text:style-name="T8">для </text:span><text:span text:style-name="T7">ArrayList и LinkedList</text:span><text:span text:style-name="T21">: </text:span></text:p>
      <text:p text:style-name="P2"><text:span text:style-name="T8"/></text:p>
      <text:p text:style-name="P2"><text:span text:style-name="T8">(100000 элементов)</text:span><text:span text:style-name="T9">, time = [ns]</text:span></text:p>
      <text:p text:style-name="P8">16359 ArrayList add time</text:p>
      <text:p text:style-name="P8">20421 LinkedList add time</text:p>
      <text:p text:style-name="P8"/>
      <text:p text:style-name="P8">95197 ArrayList insert time</text:p>
      <text:p text:style-name="P8">28370 LinkedList insert time</text:p>
      <text:p text:style-name="P8"/>
      <text:p text:style-name="P8">62483 ArrayList remove time</text:p>
      <text:p text:style-name="P8">24369 LinkedList remove time</text:p>
      <text:p text:style-name="P8"/>
      <text:p text:style-name="P9"><text:span text:style-name="T9">Вывод: </text:span><text:span text:style-name="T3">Вставка в конец осуществляется в целом примерно одинаково</text:span><text:span text:style-name="T4">. Для задачи с операциями динамического удаления или вставки в центр коллекции лучше выбирать LinkedList. </text:span></text:p>
      <text:p text:style-name="P1"/>
      <text:p text:style-name="P2"><text:span text:style-name="T6">b. </text:span><text:span text:style-name="T3">В результате сравнения основных операций(добавление, вставка, удаление элементов</text:span><text:span text:style-name="T1">) </text:span><text:span text:style-name="T8">для <text:s/></text:span><text:bookmark-start text:name="__DdeLink__143_1345356661"/><text:span text:style-name="T10">HashSet</text:span><text:span text:style-name="T5">,</text:span><text:bookmark-end text:name="__DdeLink__143_1345356661"/><text:span text:style-name="T5"> </text:span><text:span text:style-name="T10">LinkedHashSet</text:span><text:span text:style-name="T5">, </text:span><text:span text:style-name="T10">TreeSet</text:span><text:span text:style-name="T13">: </text:span></text:p>
      <text:p text:style-name="P2"><text:span text:style-name="T13"/></text:p>
      <text:p text:style-name="P7"><text:span text:style-name="T18">(</text:span><text:span text:style-name="T19">~</text:span><text:span text:style-name="T18">1</text:span><text:span text:style-name="T19">25</text:span><text:span text:style-name="T18">000 элементов)</text:span><text:span text:style-name="T20">, time = [ns]</text:span></text:p>
      <text:p text:style-name="P2"><text:span text:style-name="T13">5672 HashSet add time</text:span></text:p>
      <text:p text:style-name="P2"><text:span text:style-name="T13">4892 LinkedHashSet add time</text:span></text:p>
      <text:p text:style-name="P2"><text:span text:style-name="T13">3476 TreeSet add time</text:span></text:p>
      <text:p text:style-name="P2"><text:span text:style-name="T13"/></text:p>
      <text:p text:style-name="P2"><text:span text:style-name="T13">19808 HashSet remove time</text:span></text:p>
      <text:p text:style-name="P2"><text:span text:style-name="T13">6712 LinkedHashSet remove time</text:span></text:p>
      <text:p text:style-name="P2"><text:span text:style-name="T13">37061 TreeSet remove time</text:span></text:p>
      <text:p text:style-name="P9"><text:span text:style-name="T20">Вывод: </text:span><text:span text:style-name="T14">Вставка в конец осуществляется </text:span><text:span text:style-name="T16">быстрее в TreeSet, затем LinkedHashMap и медленне HashSet. Удаление быстрее осуществляется в LinkedHashMap, затем идет HashSet и на последнем месте TreeSet.</text:span></text:p>
      <text:p text:style-name="P11"><text:span text:style-name="T13">В целом оптимальным выбором является LinkedHashSet</text:span><text:span text:style-name="T17">.</text:span></text:p>
      <text:p text:style-name="P9"><text:span text:style-name="T15"/></text:p>
      <text:p text:style-name="P5"><text:span text:style-name="T12">c</text:span><text:span text:style-name="T11">. </text:span><text:span text:style-name="T14">В результате сравнения основных операций(добавление, вставка, удаление элементов) </text:span><text:span text:style-name="T18">для <text:s/></text:span><text:bookmark-start text:name="__DdeLink__143_13453566611"/><text:span text:style-name="T10">Hash</text:span><text:bookmark-end text:name="__DdeLink__143_13453566611"/><text:span text:style-name="T12">Map</text:span><text:span text:style-name="T10"> LinkedHash</text:span><text:span text:style-name="T12">Map</text:span><text:span text:style-name="T10">, Tree</text:span><text:span text:style-name="T12">Map</text:span><text:span text:style-name="T13">:</text:span></text:p>
      <text:p text:style-name="P5"><text:span text:style-name="T13"/></text:p>
      <text:p text:style-name="P6"><text:span text:style-name="T18">(100000 элементов)</text:span></text:p>
      <text:p text:style-name="P5"><text:span text:style-name="T13">29661 HashMap add time</text:span></text:p>
      <text:p text:style-name="P5"><text:span text:style-name="T13">30094 LinkedHashMap add time</text:span></text:p>
      <text:p text:style-name="P5"><text:span text:style-name="T13">31046 TreeMap add time</text:span></text:p>
      <text:p text:style-name="P5"><text:span text:style-name="T13"/></text:p>
      <text:p text:style-name="P5"><text:span text:style-name="T13"/></text:p>
      <text:p text:style-name="P5"><text:soft-page-break/><text:span text:style-name="T13">45721 HashMap insert time</text:span></text:p>
      <text:p text:style-name="P5"><text:span text:style-name="T13">110630 LinkedHashMap insert time</text:span></text:p>
      <text:p text:style-name="P5"><text:span text:style-name="T13">167678 TreeMap insert time</text:span></text:p>
      <text:p text:style-name="P5"><text:span text:style-name="T13"/></text:p>
      <text:p text:style-name="P5"><text:span text:style-name="T13">38239 HashMap remove time</text:span></text:p>
      <text:p text:style-name="P5"><text:span text:style-name="T13">36250 LinkedHashMap remove time</text:span></text:p>
      <text:p text:style-name="P5"><text:span text:style-name="T13">94262 TreeMap insert time</text:span></text:p>
      <text:p text:style-name="P5"><text:span text:style-name="T13"/></text:p>
      <text:p text:style-name="P10"><text:span text:style-name="T20">Вывод: </text:span><text:span text:style-name="T14">Вставка в конец осуществляется </text:span><text:span text:style-name="T16">вц елом одинаково, добавление в середину быстрее для HashMap. Удаление элементов для HashMap и LinkedHashMap почти одинаково. </text:span><text:span text:style-name="T17">Оптимальным выбором является HashMap.</text:span></text:p>
      <text:p text:style-name="P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7:55:21.056221014</meta:creation-date>
    <dc:date>2019-12-08T20:04:36.026344247</dc:date>
    <meta:editing-duration>PT8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27" meta:character-count="1692" meta:non-whitespace-character-count="1492"/>
  </office:meta>
</office:document-meta>
</file>