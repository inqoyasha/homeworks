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f439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Liberation Serif" fo:font-size="12pt" officeooo:paragraph-rsid="00138f88" style:font-size-asian="12pt" style:font-size-complex="12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Liberation Serif" officeooo:paragraph-rsid="00138f88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officeooo:paragraph-rsid="00138f88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tyle="italic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tyle="italic" officeooo:paragraph-rsid="0012f439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tyle="italic" officeooo:paragraph-rsid="00138f88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Liberation Serif" fo:font-size="12pt" fo:font-style="italic" officeooo:paragraph-rsid="00138f88" style:font-size-asian="12pt" style:font-size-complex="12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11" style:family="paragraph">
      <loext:graphic-properties draw:fill="solid" draw:fill-color="#ffffff" draw:opacity="100%"/>
      <style:paragraph-properties fo:background-color="#ffffff"/>
    </style:style>
    <style:style style:name="T1" style:family="text">
      <style:text-properties fo:color="#808080" style:font-name="DejaVu Sans Mono" fo:font-style="italic"/>
    </style:style>
    <style:style style:name="T2" style:family="text">
      <style:text-properties fo:color="#808080" fo:font-style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7d4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/----------------Perfomance test with Integer---------------------</text:p>
      <text:p text:style-name="P6">//-------------Appends element to the end of list--------------------</text:p>
      <text:p text:style-name="Standard">20070 JavaList add time</text:p>
      <text:p text:style-name="Standard">1733 MyList add time</text:p>
      <text:p text:style-name="P7">//----------------------Inserts element in the list------------------</text:p>
      <text:p text:style-name="P1">161998 JavaList insert time</text:p>
      <text:p text:style-name="P1">335359 MyList insert time</text:p>
      <text:p text:style-name="Standard"/>
      <text:p text:style-name="P10"><text:span text:style-name="T1">//---------------------Search element in the list--------------------</text:span></text:p>
      <text:p text:style-name="Standard">1475934 JavaList search time</text:p>
      <text:p text:style-name="Standard">1195601 MyList search time</text:p>
      <text:p text:style-name="Standard"/>
      <text:p text:style-name="P10"><text:span text:style-name="T1">//---------------------Remove element from list----------------------</text:span></text:p>
      <text:p text:style-name="Standard">1296766 JavaList remove time</text:p>
      <text:p text:style-name="Standard">3310295 MyList remove time</text:p>
      <text:p text:style-name="Standard"/>
      <text:p text:style-name="P6">//----------------perfomance test with MyTriangle--------------------</text:p>
      <text:p text:style-name="P8">//-------------Appends element to the end of list--------------------</text:p>
      <text:p text:style-name="Standard">20963 JavaList add time</text:p>
      <text:p text:style-name="Standard">13483 MyList add time</text:p>
      <text:p text:style-name="P8">//----------------------Inserts element in the list------------------</text:p>
      <text:p text:style-name="P2">69226 JavaList insert time</text:p>
      <text:p text:style-name="P2">77329 MyList insert time</text:p>
      <text:p text:style-name="P2"/>
      <text:p text:style-name="P5"><text:span text:style-name="T2">//---------------------Search element in the list--------------------</text:span></text:p>
      <text:p text:style-name="P3">1543070 JavaList search time</text:p>
      <text:p text:style-name="P4"><text:span text:style-name="T3">1373865 MyList search time</text:span></text:p>
      <text:p text:style-name="P4"><text:span text:style-name="T3"/></text:p>
      <text:p text:style-name="P5"><text:span text:style-name="T2">//---------------------Remove element from list----------------------</text:span></text:p>
      <text:p text:style-name="P3">1805605 JavaList remove time</text:p>
      <text:p text:style-name="P3">4099625 MyList remove time</text:p>
      <text:p text:style-name="P9"/>
      <text:p/>
      <text:p text:style-name="P2">Вывод: <text:span text:style-name="T4">так как в двусвязном списке есть возможность идти с конца, поиск в нем осуществляется быстрее, а соответственно удаление и вставка в середину происходит быстрее, что видно из полученных результатов. Вставка следующего узла(вставка в конец) осуществляется быстрее в односвязном списке, <text:s/>так как нет необходимости в указании ссылки на предыдущий элемент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0:05:00.297743931</meta:creation-date>
    <dc:date>2019-12-08T21:51:41.113767589</dc:date>
    <meta:editing-duration>PT45M5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74" meta:character-count="1453" meta:non-whitespace-character-count="1314"/>
  </office:meta>
</office:document-meta>
</file>